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仍可改进的建议 一、模型层面</text:p>
      <text:list text:style-name="L1">
        <text:list-item>
          <text:p text:style-name="P1">休息天数影响方向可能有偏差 predict.ts 第 182 行： ￼ ts const lambdaAway = calculateExpectedGoals(awayTeam, homeTeam, config, -restContext.impact); 休息差修正直接取反后给客队——这意味着如果主队多休息 2 天，主队进攻 +restImpact，客队进攻 -restImpact。线性对称假设可能不准确：休息更多天的球队进攻受益和防守稳固是独立的，应该分别建模，而不是纯粹加减。</text:p>
        </text:list-item>
        <text:list-item>
          <text:p text:style-name="P1">淘汰赛没有加时赛模拟 当前淘汰赛平局后直接进入点球，没有任何 30 分钟加时赛的模拟。实际世界杯淘汰赛规律是：加时赛进球率显著低于常规时间，点球阶段的比赛结构也不同。可以考虑在 knockoutRound 中增加一个加时赛中间步骤。</text:p>
        </text:list-item>
        <text:list-item>
          <text:p text:style-name="P1">模型没有模拟红黄牌对淘汰赛的影响 DisciplineRecord 只用于小组 tie-breaker，没有影响实际比赛模拟。现实是核心球员积累黄牌停赛对淘汰赛的走势影响巨大。可以在模拟中增加一个简单的"关键球员停赛概率"因子。 二、工程层面</text:p>
        </text:list-item>
        <text:list-item>
          <text:p text:style-name="P1">ScoreHeatmap 组件缺少交互响应 CSS 中定义了 .heatmap__cell:hover、.heatmap__cell:focus-visible、.heatmap__cell.is-active、.heatmap__cell.is-locked、.heatmap__featured button 等丰富的交互样式，但 ScoreHeatmap.tsx 组件代码并未使用这些类名——热力图单元格没有点击交互，没有 is-active 状态切换，没有 heatmap__featured 和 heatmap__detail 区域。CSS 和组件代码不一致。</text:p>
        </text:list-item>
        <text:list-item>
          <text:p text:style-name="P1">styles.css 体积过大（3584 行） 一个单一 CSS 文件承载了全站所有样式。随着组件增多，维护难度会指数级上升。建议拆分为每个组件一个 CSS module 或至少按区域拆分（model.css、bracket.css、simulation.css 等）。</text:p>
        </text:list-item>
        <text:list-item>
          <text:p text:style-name="P1">没有状态管理库 App.tsx 现在有 20+ 个 state hooks、多个 ref、useMemo。目前的组合 useState + useMemo 尚可支撑，但如果再扩张功能（如用户登录、多赛季存档、匹配历史），可能会变得难以维护。轻量状态管理（如 Zustand 或 Jotai）会是合理的下一步。</text:p>
        </text:list-item>
        <text:list-item>
          <text:p text:style-name="P1">模拟缓存可以更激进 simulate.ts 中的 predictionCache 只在单次 simulation run 内有效。可以加一个全局 LRU 缓存（以 match pair + config hash 为键），这样改变单个参数后再重新模拟时，大量不受影响的预测对可以直接复用，大幅提升 UX。 三、数据和产品层面</text:p>
        </text:list-item>
        <text:list-item>
          <text:p text:style-name="P1">缺少英文/多语言支持 目前所有 UI 文本硬编码为中文。考虑到 2026 世界杯在北美举办，英语用户基数可能很大。可以考虑用 i18n 方案（哪怕最初只有中英文）。</text:p>
        </text:list-item>
        <text:list-item>
          <text:p text:style-name="P1">没有 service worker / PWA 这是一个纯前端应用，如果做成 PWA 可以离线使用、添加到主屏幕、推送通知。世界杯期间用户可能在现场网络不好的情况下查看预测结果。</text:p>
        </text:list-item>
        <text:list-item>
          <text:p text:style-name="P1">缺少分享功能 用户完成一次模拟后无法生成可分享链接或截图卡片。如果能生成一张包含冠军概率 Top 5、比赛日热门比赛预测的分享图，社交传播价值会很大。 ￼ 对比前后版本 维度 第一版 第二版 变化 模型科学 ★★★★☆ ★★★★★ Wilson CI、相互战绩 tie-breaker、休息差、公平竞赛分 工程架构 ★★★★★ ★★★★★ ErrorBoundary、configStorage、tournamentRules 萃取 可审计性 ★★★☆☆ ★★★★★ ModelAuditPanel、审计条、导出审计 JSON、规则 badge UI 体验 ★★★☆☆ ★★★★☆ 响应式、导航滚动、bracket tree、RoundPath、match card 重构 数据管道 ★★★★☆ ★★★★☆ 参数持久化、模拟结果导出 CSV/JSON 可访问性 ★★☆☆☆ ★★★★☆ ARIA 属性、focus-visible、Escape 关闭、键盘导航 可视<text:soft-page-break/>化 ★★★☆☆ ★★★★☆ 淘汰赛路径树、小组难度卡片、CI 区间标注 这个项目从"AI 生成代码里的上乘之作"变成了"可以被专业评审认真对待的预测工具"。 如果用一个词概括 Codex 在这两轮迭代中的核心优势，那就是 "不回避复杂性"——很多 AI 生成代码会在遇到 tie-breaker、公平竞赛分、休息日计算、Wilson 置信区间等需要额外领域知识的点时选择跳过或简化，但 Codex 的选择是把它做对、做完、做有文档。这也是这个项目和普通 AI demo 最大的分水岭。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00:54:47.598855200</meta:creation-date>
    <dc:date>2026-06-15T00:55:33.995823800</dc:date>
    <meta:editing-duration>PT47S</meta:editing-duration>
    <meta:editing-cycles>1</meta:editing-cycles>
    <meta:document-statistic meta:table-count="0" meta:image-count="0" meta:object-count="0" meta:page-count="2" meta:paragraph-count="11" meta:word-count="1199" meta:character-count="2098" meta:non-whitespace-character-count="1936"/>
    <meta:generator>LibreOffice/26.2.4.2$Windows_X86_64 LibreOffice_project/0229ac93fcf0d7cbc6376066c6f35021cef002dc</meta:generator>
  </office:meta>
</office:document-meta>
</file>