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  <style:font-face style:name="新宋体" svg:font-family="新宋体" style:font-family-generic="modern" style:font-pitch="fixed"/>
  </office:font-face-decls>
  <office:automatic-styles>
    <style:style style:name="表格1" style:family="table">
      <style:table-properties style:width="12.584cm" table:align="left"/>
    </style:style>
    <style:style style:name="表格1.A" style:family="table-column">
      <style:table-column-properties style:column-width="1.695cm"/>
    </style:style>
    <style:style style:name="表格1.B" style:family="table-column">
      <style:table-column-properties style:column-width="2.039cm"/>
    </style:style>
    <style:style style:name="表格1.C" style:family="table-column">
      <style:table-column-properties style:column-width="8.849cm"/>
    </style:style>
    <style:style style:name="表格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好的，我已经详细通读了整个项目源码。这是一个 Codex 生成的 2026 世界杯预测器，React + TypeScript + Vite 技术栈。整体来说质量非常高，下面分几个维度来评价。</text:p>
      <text:p text:style-name="Horizontal_20_Line"/>
      <text:h text:style-name="Heading_20_2" text:outline-level="2">总体评价</text:h>
      <text:p text:style-name="Text_20_body">这个项目的工程质量和模型深度远超一般"AI demo 级"产物。它有完整的数据管道、统计模型、蒙特卡洛模拟引擎、Web Worker 并行、本地持久化、模型回测校准等，在 AI 生成代码的范畴里属于顶层水平。和很多独立开发者手写的项目比也不逊色。</text:p>
      <text:p text:style-name="Horizontal_20_Line"/>
      <text:h text:style-name="Heading_20_2" text:outline-level="2">优点亮点</text:h>
      <text:h text:style-name="Heading_20_3" text:outline-level="3">1. 模型选型合理且实现扎实</text:h>
      <text:p text:style-name="Text_20_body">核心用的是 <text:span text:style-name="Strong_20_Emphasis">双泊松分布 + Dixon-Coles 低比分修正</text:span>，这是足球预测的经典统计模型，简单有效，比纯 ELO 或随便调个 ML 模型要靠谱得多。<text:span text:style-name="Source_20_Text">buildScoreMatrix</text:span> 里的 DC 修正因子的分段处理是正确的（特别是 <text:span text:style-name="Source_20_Text">1 - λ_home * λ_away * ρ</text:span> 这个 0-0 校正公式）。</text:p>
      <text:h text:style-name="Heading_20_3" text:outline-level="3">2. 蒙特卡洛模拟完整</text:h>
      <text:p text:style-name="Text_20_body"><text:span text:style-name="Source_20_Text">simulate.ts</text:span> 覆盖了全部赛制逻辑：小组赛 → 小组排名 → 最佳第三名晋级 → 32 强配对 → 淘汰赛 → 点球决胜。特别是第三名晋级选择（<text:span text:style-name="Source_20_Text">bestThirds</text:span> 排序取前 8）和 32 强交叉配对（第一 vs 第三、第二 vs 第二），完全按照世界杯赛制实现。</text:p>
      <text:h text:style-name="Heading_20_3" text:outline-level="3">3. 工程架构出色</text:h>
      <text:p text:style-name="Preformatted_20_Text"><text:span text:style-name="Source_20_Text">src/</text:span></text:p>
      <text:p text:style-name="Preformatted_20_Text"><text:span text:style-name="Source_20_Text">├── model/ <text:s text:c="7"/># 纯函数，可测试</text:span></text:p>
      <text:p text:style-name="Preformatted_20_Text"><text:span text:style-name="Source_20_Text">├── components/ <text:s text:c="2"/># UI 组件</text:span></text:p>
      <text:p text:style-name="Preformatted_20_Text"><text:span text:style-name="Source_20_Text">├── data/ <text:s text:c="8"/># 数据导入/导出/持久化</text:span></text:p>
      <text:p text:style-name="Preformatted_20_Text"><text:span text:style-name="Source_20_Text">├── workers/ <text:s text:c="5"/># Web Worker 通信协议</text:span></text:p>
      <text:p text:style-name="P1"><text:span text:style-name="Source_20_Text">├── utils/ <text:s text:c="7"/># 工具函数</text:span></text:p>
      <text:p text:style-name="Text_20_body">关注点分离非常清晰。特别是 Web Worker 通信全都有类型定义和运行时校验（<text:span text:style-name="Source_20_Text">isSimulationWorkerRequest</text:span>），这在 AI 生成代码里很少见。</text:p>
      <text:h text:style-name="Heading_20_3" text:outline-level="3">4. Worker 降级机制</text:h>
      <text:p text:style-name="Text_20_body">自动检测 <text:span text:style-name="Source_20_Text">typeof Worker === "undefined"</text:span>，如果 Worker 不可用则回退到主线程 <text:span text:style-name="Source_20_Text">setTimeout</text:span> 异步执行。<text:span text:style-name="Source_20_Text">simulationTaskIdRef</text:span> 用递增 ID 处理并发请求取消，细节做得很到位。</text:p>
      <text:h text:style-name="Heading_20_3" text:outline-level="3"><text:soft-page-break/>5. 模型回测系统</text:h>
      <text:p text:style-name="Text_20_body"><text:span text:style-name="Source_20_Text">evaluation.ts</text:span> 里自带了 Brier Score + Log Loss + 方向命中率的评估体系，还能自动对比多个预设的校准效果，给出推荐。这已经达到了生产级预测系统的标配。</text:p>
      <text:h text:style-name="Heading_20_3" text:outline-level="3">6. 数据导入/导出完整</text:h>
      <text:p text:style-name="Text_20_body">JSON 导入 → 预检预览 → 模型影响估算 → 确认应用 → 快照历史 → 一键回滚，整个数据生命周期管得很好。</text:p>
      <text:p text:style-name="Horizontal_20_Line"/>
      <text:h text:style-name="Heading_20_2" text:outline-level="2">改进建议</text:h>
      <text:h text:style-name="Heading_20_3" text:outline-level="3">一、模型层面的建议</text:h>
      <text:p text:style-name="Text_20_body"><text:span text:style-name="Strong_20_Emphasis">1. 小组赛同分时缺少 FIFA 标准 tie-breaker</text:span> <text:span text:style-name="Source_20_Text">sortStandings</text:span> 目前只比较积分和净胜球，但 FIFA 官方 tie-breaker 顺序是：积分 → 净胜球 → 进球数 → 相互战绩 → 公平竞赛积分 → 抽签。模拟中可能出现积分+净胜球都相同的场景，这里可以补全。看到了，<text:span text:style-name="Source_20_Text">sortStandings</text:span> 其实已经有 <text:span text:style-name="Source_20_Text">goalsFor → wins → ELO</text:span> 的层级，考虑得比我想的周全一些。ELO 作为最终打破平局的替代是合理的，因为模拟中无法做真实相互战绩比较。</text:p>
      <text:h text:style-name="Heading_20_3" text:outline-level="3">二、UI/UX 层面的建议</text:h>
      <text:p text:style-name="Text_20_body"><text:span text:style-name="Strong_20_Emphasis">2. 没有响应式布局</text:span> <text:span text:style-name="Source_20_Text">sidebar { width: 236px; }</text:span> 是固定宽度，<text:span text:style-name="Source_20_Text">dashboard-grid</text:span> 用 <text:span text:style-name="Source_20_Text">grid-template-columns</text:span> 三段布局。在手机或平板上会完全破碎。可以加一个 CSS media query 断点切换成单列或双列。</text:p>
      <text:p text:style-name="Text_20_body"><text:span text:style-name="Strong_20_Emphasis">3. 比分热力图的交互性偏弱</text:span> 现在的 <text:span text:style-name="Source_20_Text">ScoreHeatmap</text:span> 是静态 6×6 网格，绿色深浅表示概率。更好的方案是：悬停高亮对应比分、点击筛选模拟场景、或者用 tooltip 显示精确百分比。</text:p>
      <text:p text:style-name="Text_20_body"><text:span text:style-name="Strong_20_Emphasis">4. 淘汰赛对阵图只是一个列表</text:span> <text:span text:style-name="Source_20_Text">BracketPreview</text:span> 目前是 <text:span text:style-name="Source_20_Text">&lt;div class="bracket__slot"&gt;</text:span> 的列表。如果能画一个真正的树状淘汰赛 bracket（像 ESPN 那种），用户能直观看到球队从哪个半区出线、可能路径上的对手，体验会提升很多。</text:p>
      <text:h text:style-name="Heading_20_3" text:outline-level="3">三、数据层面的建议</text:h>
      <text:p text:style-name="Text_20_body"><text:span text:style-name="Strong_20_Emphasis">5. 没有置信区间</text:span> 现在的模拟概率是点估计（冠军 15.2%），但没有给出置信区间（如 95% CI：13.8%-16.7%）。10,000 次模拟理论上可以用 bootstrap 算出不确定性范围。这对决策参考非常重要——15% 和 20% 的差异有没有统计意义？</text:p>
      <text:p text:style-name="Text_20_body"><text:span text:style-name="Strong_20_Emphasis">6. 没有实际数据抓取</text:span> <text:span text:style-name="Source_20_Text">npm run data:update</text:span> 的脚本看起来是占位的，数据来源是本地 CSV/JSON 手动导入。如果能接入一个实时 API（如足球数据 API），加上定时刷新，这个工具的价值会翻倍。</text:p>
      <text:p text:style-name="Text_20_body"><text:span text:style-name="Strong_20_Emphasis">7. 球队评分数据是静态的</text:span> <text:span text:style-name="Source_20_Text">attack</text:span>、<text:span text:style-name="Source_20_Text">defense</text:span>、<text:span text:style-name="Source_20_Text">form</text:span>、<text:span text:style-name="Source_20_Text">injuries</text:span> 这些字段来源不明（<text:span text:style-name="Source_20_Text">teams.ts</text:span> 应该是硬编码的）。赛事期间这些数据会每天变化，目前的管线缺少增量更新机制。</text:p>
      <text:h text:style-name="Heading_20_3" text:outline-level="3"><text:soft-page-break/>四、代码层面的建议</text:h>
      <text:p text:style-name="Text_20_body"><text:span text:style-name="Strong_20_Emphasis">8. 缺少 React Error Boundary</text:span> 没有任何错误边界包裹组件。如果某个组件 crash（比如 <text:span text:style-name="Source_20_Text">teamsById.get</text:span> 返回 undefined 然后访问 <text:span text:style-name="Source_20_Text">.name</text:span>），整个页面白屏。特别是 <text:span text:style-name="Source_20_Text">MatchPredictionCard</text:span> 里 <text:span text:style-name="Source_20_Text">home.name</text:span> 等是直接解构的，缺少防御性检查。</text:p>
      <text:p text:style-name="Text_20_body"><text:span text:style-name="Strong_20_Emphasis">9. </text:span><text:span text:style-name="Strong_20_Emphasis"><text:span text:style-name="Source_20_Text">predictMatch</text:span></text:span><text:span text:style-name="Strong_20_Emphasis"> 每次重新创建全部 </text:span><text:span text:style-name="Strong_20_Emphasis"><text:span text:style-name="Source_20_Text">scoreMatrix</text:span></text:span> <text:span text:style-name="Source_20_Text">predictions</text:span> 通过 <text:span text:style-name="Source_20_Text">useMemo</text:span> 依赖 <text:span text:style-name="Source_20_Text">[config, fixtures, teams]</text:span>，当 config 改变时全部 48+ 场比赛的 7×7 概率矩阵会全部重建。对于一致性场景（只调整了一个滑块），可以缓存不受影响的预测。</text:p>
      <text:p text:style-name="Text_20_body"><text:span text:style-name="Strong_20_Emphasis">10. 测试覆盖有缺口</text:span> 虽然 <text:span text:style-name="Source_20_Text">model.test.mjs</text:span> 有 22KB 看起来不小，但：</text:p>
      <text:list text:style-name="L1">
        <text:list-item>
          <text:p text:style-name="P2">没有 UI 组件测试（哪怕是快照测试） </text:p>
        </text:list-item>
        <text:list-item>
          <text:p text:style-name="P2">没有端到端测试验证模拟结果统计合理性（比如仿真完成后夺冠概率总和约等于 1） </text:p>
        </text:list-item>
        <text:list-item>
          <text:p text:style-name="P3">Worker 协议没有 mock 测试 </text:p>
        </text:list-item>
      </text:list>
      <text:p text:style-name="Horizontal_20_Line"/>
      <text:h text:style-name="Heading_20_2" text:outline-level="2">总结</text:h>
      <table:table table:name="表格1" table:style-name="表格1">
        <table:table-column table:style-name="表格1.A"/>
        <table:table-column table:style-name="表格1.B"/>
        <table:table-column table:style-name="表格1.C"/>
        <table:table-header-rows>
          <table:table-row>
            <table:table-cell table:style-name="表格1.A1" office:value-type="string">
              <text:p text:style-name="Table_20_Heading">维度</text:p>
            </table:table-cell>
            <table:table-cell table:style-name="表格1.A1" office:value-type="string">
              <text:p text:style-name="Table_20_Heading">评分</text:p>
            </table:table-cell>
            <table:table-cell table:style-name="表格1.A1" office:value-type="string">
              <text:p text:style-name="Table_20_Heading">说明</text:p>
            </table:table-cell>
          </table:table-row>
        </table:table-header-rows>
        <table:table-row>
          <table:table-cell table:style-name="表格1.A1" office:value-type="string">
            <text:p text:style-name="Table_20_Contents">模型科学</text:p>
          </table:table-cell>
          <table:table-cell table:style-name="表格1.A1" office:value-type="string">
            <text:p text:style-name="Table_20_Contents">★★★★☆</text:p>
          </table:table-cell>
          <table:table-cell table:style-name="表格1.A1" office:value-type="string">
            <text:p text:style-name="Table_20_Contents">泊松+DC 是合理选择，但缺少置信区间</text:p>
          </table:table-cell>
        </table:table-row>
        <table:table-row>
          <table:table-cell table:style-name="表格1.A1" office:value-type="string">
            <text:p text:style-name="Table_20_Contents">工程架构</text:p>
          </table:table-cell>
          <table:table-cell table:style-name="表格1.A1" office:value-type="string">
            <text:p text:style-name="Table_20_Contents">★★★★★</text:p>
          </table:table-cell>
          <table:table-cell table:style-name="表格1.A1" office:value-type="string">
            <text:p text:style-name="Table_20_Contents">模块化、类型安全、Worker 降级，AI 代码中的标杆</text:p>
          </table:table-cell>
        </table:table-row>
        <table:table-row>
          <table:table-cell table:style-name="表格1.A1" office:value-type="string">
            <text:p text:style-name="Table_20_Contents">UI 体验</text:p>
          </table:table-cell>
          <table:table-cell table:style-name="表格1.A1" office:value-type="string">
            <text:p text:style-name="Table_20_Contents">★★★☆☆</text:p>
          </table:table-cell>
          <table:table-cell table:style-name="表格1.A1" office:value-type="string">
            <text:p text:style-name="Table_20_Contents">可读性好但响应式缺失，淘汰赛展示弱</text:p>
          </table:table-cell>
        </table:table-row>
        <table:table-row>
          <table:table-cell table:style-name="表格1.A1" office:value-type="string">
            <text:p text:style-name="Table_20_Contents">数据管道</text:p>
          </table:table-cell>
          <table:table-cell table:style-name="表格1.A1" office:value-type="string">
            <text:p text:style-name="Table_20_Contents">★★★★☆</text:p>
          </table:table-cell>
          <table:table-cell table:style-name="表格1.A1" office:value-type="string">
            <text:p text:style-name="Table_20_Contents">导入/导出/历史完整，但缺少实时数据源</text:p>
          </table:table-cell>
        </table:table-row>
        <table:table-row>
          <table:table-cell table:style-name="表格1.A1" office:value-type="string">
            <text:p text:style-name="Table_20_Contents">测试质量</text:p>
          </table:table-cell>
          <table:table-cell table:style-name="表格1.A1" office:value-type="string">
            <text:p text:style-name="Table_20_Contents">★★★☆☆</text:p>
          </table:table-cell>
          <table:table-cell table:style-name="表格1.A1" office:value-type="string">
            <text:p text:style-name="Table_20_Contents">模型测试不错，但 UI/E2E/收敛性测试缺失</text:p>
          </table:table-cell>
        </table:table-row>
        <table:table-row>
          <table:table-cell table:style-name="表格1.A1" office:value-type="string">
            <text:p text:style-name="Table_20_Contents">可维护性</text:p>
          </table:table-cell>
          <table:table-cell table:style-name="表格1.A1" office:value-type="string">
            <text:p text:style-name="Table_20_Contents">★★★★★</text:p>
          </table:table-cell>
          <table:table-cell table:style-name="表格1.A1" office:value-type="string">
            <text:p text:style-name="Table_20_Contents">代码风格统一，类型覆盖完整，注释恰当</text:p>
          </table:table-cell>
        </table:table-row>
      </table:table>
      <text:p text:style-name="Text_20_body"><text:span text:style-name="Strong_20_Emphasis">总体印象：这是一个被低估的项目。</text:span> 它看起来像是一个"AI demo"，但实际代码质量已经超过了很大一部分手写的世界杯预测工具。核心的统计模型、模拟引擎和数据管道都非常扎实。最大的差距（也是最大的改进空间）在 <text:span text:style-name="Strong_20_Emphasis">前端可视化丰富度</text:span> 和 <text:span text:style-name="Strong_20_Emphasis">实时数据接入</text:span> 这两块。如果把淘汰赛 bracket 可视化补上、接入实时数据源、加上响应式布局，它完全可以作为一个面向公众的世界杯预测站点上线。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  <style:font-face style:name="新宋体" svg:font-family="新宋体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SC" style:font-family-asian="'Noto Serif SC'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SC" style:font-family-asian="'Noto Serif SC'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新宋体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新宋体" style:font-family-asian="新宋体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4T02:25:55.455370800</meta:creation-date>
    <dc:date>2026-06-14T02:26:13.992378100</dc:date>
    <meta:editing-duration>PT19S</meta:editing-duration>
    <meta:editing-cycles>1</meta:editing-cycles>
    <meta:document-statistic meta:table-count="1" meta:image-count="0" meta:object-count="0" meta:page-count="3" meta:paragraph-count="63" meta:word-count="1818" meta:character-count="2887" meta:non-whitespace-character-count="2599"/>
    <meta:generator>LibreOffice/26.2.4.2$Windows_X86_64 LibreOffice_project/0229ac93fcf0d7cbc6376066c6f35021cef002dc</meta:generator>
  </office:meta>
</office:document-meta>
</file>